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1483F0000844200004A6AFB85C6A6.svg" manifest:media-type="image/svg+xml"/>
  <manifest:file-entry manifest:full-path="Pictures/100140FD00006D5900005210432E18AA.svg" manifest:media-type="image/svg+xml"/>
  <manifest:file-entry manifest:full-path="Pictures/10000001000002A100000034B0BC5979.png" manifest:media-type="image/png"/>
  <manifest:file-entry manifest:full-path="Pictures/10000001000003AF000002120FEEE525.png" manifest:media-type="image/png"/>
  <manifest:file-entry manifest:full-path="Pictures/1000000100000264000001B9C129C42A.png" manifest:media-type="image/png"/>
  <manifest:file-entry manifest:full-path="Pictures/1000C4040000844200004A6AC41BFA7B.svg" manifest:media-type="image/svg+xml"/>
  <manifest:file-entry manifest:full-path="Pictures/10000001000003AF000002128D4164E9.png" manifest:media-type="image/png"/>
  <manifest:file-entry manifest:full-path="Pictures/1000B19E00006D5900005210C7B17D62.svg" manifest:media-type="image/svg+xml"/>
  <manifest:file-entry manifest:full-path="Pictures/10000001000003300000026573228AA0.png" manifest:media-type="image/png"/>
  <manifest:file-entry manifest:full-path="Pictures/100000010000033000000265FAA5917E.png" manifest:media-type="image/png"/>
  <manifest:file-entry manifest:full-path="Pictures/1000000100000191000000886E679875.png" manifest:media-type="image/png"/>
  <manifest:file-entry manifest:full-path="Pictures/1000000100000322000001EBF5EB9ADE.png" manifest:media-type="image/png"/>
  <manifest:file-entry manifest:full-path="Pictures/10000001000002FD000000B90936A9D2.png" manifest:media-type="image/png"/>
  <manifest:file-entry manifest:full-path="Pictures/100000010000036B0000025BB00A2B63.png" manifest:media-type="image/png"/>
  <manifest:file-entry manifest:full-path="Pictures/100000010000055B0000012AA576EEE9.png" manifest:media-type="image/png"/>
  <manifest:file-entry manifest:full-path="Pictures/10000001000002E6000001D1520A4C87.png" manifest:media-type="image/png"/>
  <manifest:file-entry manifest:full-path="Pictures/1000000100000580000002197AAB1A09.png" manifest:media-type="image/png"/>
  <manifest:file-entry manifest:full-path="Pictures/10000001000005470000012D409A07EA.png" manifest:media-type="image/png"/>
  <manifest:file-entry manifest:full-path="Pictures/100000010000052600000251F0ED8340.png" manifest:media-type="image/png"/>
  <manifest:file-entry manifest:full-path="Pictures/10000001000007580000040E0644ADF5.png" manifest:media-type="image/png"/>
  <manifest:file-entry manifest:full-path="Pictures/10000001000001E500000045E076B3C4.png" manifest:media-type="image/png"/>
  <manifest:file-entry manifest:full-path="Pictures/10000001000003230000007BDAC8C59F.png" manifest:media-type="image/png"/>
  <manifest:file-entry manifest:full-path="Pictures/10000001000002D9000002183DA77085.png" manifest:media-type="image/png"/>
  <manifest:file-entry manifest:full-path="Pictures/100000010000020E00000181D1A7CEE4.png" manifest:media-type="image/png"/>
  <manifest:file-entry manifest:full-path="Pictures/10000001000002D300000218F9D258C2.png" manifest:media-type="image/png"/>
  <manifest:file-entry manifest:full-path="Pictures/100000010000025B000000333A13D5FF.png" manifest:media-type="image/png"/>
  <manifest:file-entry manifest:full-path="Pictures/100000010000030A000000C6FDFA60EF.png" manifest:media-type="image/png"/>
  <manifest:file-entry manifest:full-path="Pictures/10000001000002450000005BD4673001.png" manifest:media-type="image/png"/>
  <manifest:file-entry manifest:full-path="Pictures/1000000100000252000000A148758353.png" manifest:media-type="image/png"/>
  <manifest:file-entry manifest:full-path="Pictures/100000010000023F00000028669D71E5.png" manifest:media-type="image/png"/>
  <manifest:file-entry manifest:full-path="Pictures/10000001000003310000021CB337C21B.png" manifest:media-type="image/png"/>
  <manifest:file-entry manifest:full-path="Pictures/100000010000033800000192F3AF6BF4.png" manifest:media-type="image/png"/>
  <manifest:file-entry manifest:full-path="Pictures/100000010000024D0000003E57E02F67.png" manifest:media-type="image/png"/>
  <manifest:file-entry manifest:full-path="Pictures/1000000100000320000001BF120A993B.png" manifest:media-type="image/png"/>
  <manifest:file-entry manifest:full-path="Pictures/100000010000022E00000017AA455A6D.png" manifest:media-type="image/png"/>
  <manifest:file-entry manifest:full-path="Pictures/1000000100000328000001FB8A111EA9.png" manifest:media-type="image/png"/>
  <manifest:file-entry manifest:full-path="Pictures/100000010000025D0000002FD31F7A77.png" manifest:media-type="image/png"/>
  <manifest:file-entry manifest:full-path="Pictures/10000001000001F70000003DF309D221.png" manifest:media-type="image/png"/>
  <manifest:file-entry manifest:full-path="Pictures/10000001000002320000002DDDF2CC2A.png" manifest:media-type="image/png"/>
  <manifest:file-entry manifest:full-path="Pictures/100000010000020D000001FA841A5D21.png" manifest:media-type="image/png"/>
  <manifest:file-entry manifest:full-path="Pictures/100000010000026D0000007292DA2880.png" manifest:media-type="image/png"/>
  <manifest:file-entry manifest:full-path="Pictures/10000001000006600000024D2EC77613.png" manifest:media-type="image/png"/>
  <manifest:file-entry manifest:full-path="Pictures/1000000100000214000000FB3B067247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2cm" svg:height="3.6cm" svg:x="1.4cm" svg:y="2.25cm" presentation:class="title">
          <draw:text-box>
            <text:p>BASH SHELL</text:p>
          </draw:text-box>
        </draw:frame>
        <draw:frame presentation:style-name="pr2" draw:text-style-name="P2" draw:layer="layout" svg:width="25.2cm" svg:height="7.65cm" svg:x="1.4cm" svg:y="6.6cm" presentation:class="subtitle" presentation:user-transformed="true">
          <draw:text-box>
            <text:p text:style-name="P1"><text:span text:style-name="T1">by Moi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2cm" svg:height="2.63cm" svg:x="1.4cm" svg:y="0.627cm" presentation:class="title" presentation:user-transformed="true">
          <draw:text-box>
            <text:p>Job1</text:p>
          </draw:text-box>
        </draw:frame>
        <draw:frame draw:style-name="gr2" draw:text-style-name="P4" draw:layer="layout" svg:width="8.643cm" svg:height="5.291cm" svg:x="3.04cm" svg:y="3.709cm" presentation:class="graphic" presentation:user-transformed="true">
          <draw:image xlink:href="Pictures/1000000100000322000001EBF5EB9ADE.png" xlink:type="simple" xlink:show="embed" xlink:actuate="onLoad" draw:mime-type="image/png">
            <text:p/>
          </draw:image>
        </draw:frame>
        <draw:frame draw:style-name="gr2" draw:text-style-name="P4" draw:layer="layout" svg:width="15.21cm" svg:height="3.677cm" svg:x="2cm" svg:y="10.846cm">
          <draw:image xlink:href="Pictures/10000001000002FD000000B90936A9D2.png" xlink:type="simple" xlink:show="embed" xlink:actuate="onLoad" draw:mime-type="image/png">
            <text:p/>
          </draw:image>
        </draw:frame>
        <draw:frame draw:style-name="gr2" draw:text-style-name="P4" draw:layer="layout" svg:width="10.158cm" svg:height="7cm" svg:x="14.342cm" svg:y="3.257cm">
          <draw:image xlink:href="Pictures/100000010000036B0000025BB00A2B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Job 2</text:p>
          </draw:text-box>
        </draw:frame>
        <draw:frame draw:style-name="gr2" draw:text-style-name="P4" draw:layer="layout" svg:width="17.5cm" svg:height="3.803cm" svg:x="3.5cm" svg:y="2.871cm" presentation:class="graphic" presentation:user-transformed="true">
          <draw:image xlink:href="Pictures/100000010000055B0000012AA576EEE9.png" xlink:type="simple" xlink:show="embed" xlink:actuate="onLoad" draw:mime-type="image/png">
            <text:p/>
          </draw:image>
        </draw:frame>
        <draw:frame draw:style-name="gr2" draw:text-style-name="P4" draw:layer="layout" svg:width="17.5cm" svg:height="6.675cm" svg:x="4cm" svg:y="7.5cm">
          <draw:image xlink:href="Pictures/1000000100000580000002197AAB1A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4" draw:layer="layout" svg:width="20.1cm" svg:height="4.477cm" svg:x="1.5cm" svg:y="3.5cm" presentation:class="graphic" presentation:user-transformed="true">
          <draw:image xlink:href="Pictures/10000001000005470000012D409A07EA.png" xlink:type="simple" xlink:show="embed" xlink:actuate="onLoad" draw:mime-type="image/png">
            <text:p/>
          </draw:image>
        </draw:frame>
        <draw:frame draw:style-name="gr2" draw:text-style-name="P4" draw:layer="layout" svg:width="14.9cm" svg:height="6.703cm" svg:x="5.6cm" svg:y="8.297cm">
          <draw:image xlink:href="Pictures/100000010000052600000251F0ED83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Job 3</text:p>
          </draw:text-box>
        </draw:frame>
        <draw:frame draw:style-name="gr2" draw:text-style-name="P4" draw:layer="layout" svg:width="17.272cm" svg:height="9.536cm" svg:x="5cm" svg:y="3.964cm" presentation:class="graphic" presentation:user-transformed="true">
          <draw:image xlink:href="Pictures/10000001000007580000040E0644AD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" draw:text-style-name="P4" draw:layer="layout" svg:width="9.658cm" svg:height="3.5cm" svg:x="9cm" svg:y="2cm">
          <draw:image xlink:href="Pictures/1000000100000191000000886E679875.png" xlink:type="simple" xlink:show="embed" xlink:actuate="onLoad" draw:mime-type="image/png">
            <text:p/>
          </draw:image>
        </draw:frame>
        <draw:frame draw:style-name="gr2" draw:text-style-name="P4" draw:layer="layout" svg:width="16.5cm" svg:height="2.345cm" svg:x="5.5cm" svg:y="7.155cm">
          <draw:image xlink:href="Pictures/10000001000001E500000045E076B3C4.png" xlink:type="simple" xlink:show="embed" xlink:actuate="onLoad" draw:mime-type="image/png">
            <text:p/>
          </draw:image>
        </draw:frame>
        <draw:frame draw:style-name="gr2" draw:text-style-name="P4" draw:layer="layout" svg:width="17.578cm" svg:height="2.691cm" svg:x="5.422cm" svg:y="10.5cm">
          <draw:image xlink:href="Pictures/10000001000003230000007BDAC8C5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Job 4</text:p>
          </draw:text-box>
        </draw:frame>
        <draw:frame draw:style-name="gr2" draw:text-style-name="P4" draw:layer="layout" svg:width="10cm" svg:height="6.169cm" svg:x="3cm" svg:y="3.257cm">
          <draw:image xlink:href="Pictures/10000001000002D9000002183DA77085.png" xlink:type="simple" xlink:show="embed" xlink:actuate="onLoad" draw:mime-type="image/png">
            <text:p/>
          </draw:image>
        </draw:frame>
        <draw:frame draw:style-name="gr2" draw:text-style-name="P4" draw:layer="layout" svg:width="11.5cm" svg:height="8.525cm" svg:x="15cm" svg:y="4.975cm">
          <draw:image xlink:href="Pictures/10000001000002D300000218F9D258C2.png" xlink:type="simple" xlink:show="embed" xlink:actuate="onLoad" draw:mime-type="image/png">
            <text:p/>
          </draw:image>
        </draw:frame>
        <draw:frame draw:style-name="gr2" draw:text-style-name="P4" draw:layer="layout" svg:width="13cm" svg:height="1.099cm" svg:x="1.5cm" svg:y="10.19cm">
          <draw:image xlink:href="Pictures/100000010000025B000000333A13D5FF.png" xlink:type="simple" xlink:show="embed" xlink:actuate="onLoad" draw:mime-type="image/png">
            <text:p/>
          </draw:image>
        </draw:frame>
        <draw:frame draw:style-name="gr2" draw:text-style-name="P4" draw:layer="layout" svg:width="12.714cm" svg:height="1.991cm" svg:x="1.5cm" svg:y="13.009cm">
          <draw:image xlink:href="Pictures/10000001000002450000005BD4673001.png" xlink:type="simple" xlink:show="embed" xlink:actuate="onLoad" draw:mime-type="image/png">
            <text:p/>
          </draw:image>
        </draw:frame>
        <draw:frame draw:style-name="gr2" draw:text-style-name="P4" draw:layer="layout" svg:width="13.214cm" svg:height="0.918cm" svg:x="1.286cm" svg:y="11.582cm">
          <draw:image xlink:href="Pictures/100000010000023F00000028669D71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" draw:text-style-name="P4" draw:layer="layout" svg:width="12.1cm" svg:height="1.739cm" svg:x="1.4cm" svg:y="1.261cm">
          <draw:image xlink:href="Pictures/100000010000024D0000003E57E02F67.png" xlink:type="simple" xlink:show="embed" xlink:actuate="onLoad" draw:mime-type="image/png">
            <text:p/>
          </draw:image>
        </draw:frame>
        <draw:frame draw:style-name="gr2" draw:text-style-name="P4" draw:layer="layout" svg:width="14.5cm" svg:height="3.69cm" svg:x="1.5cm" svg:y="3.5cm">
          <draw:image xlink:href="Pictures/100000010000030A000000C6FDFA60EF.png" xlink:type="simple" xlink:show="embed" xlink:actuate="onLoad" draw:mime-type="image/png">
            <text:p/>
          </draw:image>
        </draw:frame>
        <draw:frame draw:style-name="gr2" draw:text-style-name="P4" draw:layer="layout" svg:width="11.134cm" svg:height="6.221cm" svg:x="14.366cm" svg:y="7.779cm">
          <draw:image xlink:href="Pictures/1000000100000320000001BF120A99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Job 5</text:p>
          </draw:text-box>
        </draw:frame>
        <draw:frame draw:style-name="gr2" draw:text-style-name="P4" draw:layer="layout" svg:width="11.1cm" svg:height="3.315cm" svg:x="1.4cm" svg:y="3.685cm">
          <draw:image xlink:href="Pictures/100000010000030A000000C6FDFA60EF.png" xlink:type="simple" xlink:show="embed" xlink:actuate="onLoad" draw:mime-type="image/png">
            <text:p/>
          </draw:image>
        </draw:frame>
        <draw:frame draw:style-name="gr2" draw:text-style-name="P4" draw:layer="layout" svg:width="12.5cm" svg:height="6.097cm" svg:x="1.5cm" svg:y="7.903cm">
          <draw:image xlink:href="Pictures/100000010000033800000192F3AF6BF4.png" xlink:type="simple" xlink:show="embed" xlink:actuate="onLoad" draw:mime-type="image/png">
            <text:p/>
          </draw:image>
        </draw:frame>
        <draw:frame draw:style-name="gr2" draw:text-style-name="P4" draw:layer="layout" svg:width="11.668cm" svg:height="6.519cm" svg:x="15.344cm" svg:y="7.5cm">
          <draw:image xlink:href="Pictures/1000000100000320000001BF120A99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2" draw:text-style-name="P4" draw:layer="layout" svg:width="12cm" svg:height="0.774cm" svg:x="6.5cm" svg:y="3cm">
          <draw:image xlink:href="Pictures/100000010000022E00000017AA455A6D.png" xlink:type="simple" xlink:show="embed" xlink:actuate="onLoad" draw:mime-type="image/png">
            <text:p/>
          </draw:image>
        </draw:frame>
        <draw:frame draw:style-name="gr2" draw:text-style-name="P4" draw:layer="layout" svg:width="15cm" svg:height="9.412cm" svg:x="6cm" svg:y="4.5cm">
          <draw:image xlink:href="Pictures/1000000100000328000001FB8A111E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Job 6</text:p>
          </draw:text-box>
        </draw:frame>
        <draw:frame draw:style-name="gr2" draw:text-style-name="P4" draw:layer="layout" svg:width="12.069cm" svg:height="7.5cm" svg:x="7.431cm" svg:y="3.5cm">
          <draw:image xlink:href="Pictures/10000001000003310000021CB337C21B.png" xlink:type="simple" xlink:show="embed" xlink:actuate="onLoad" draw:mime-type="image/png">
            <text:p/>
          </draw:image>
        </draw:frame>
        <draw:frame draw:style-name="gr2" draw:text-style-name="P4" draw:layer="layout" svg:width="16.008cm" svg:height="1.242cm" svg:x="6cm" svg:y="12.258cm">
          <draw:image xlink:href="Pictures/100000010000025D0000002FD31F7A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Job 7</text:p>
          </draw:text-box>
        </draw:frame>
        <draw:frame draw:style-name="gr2" draw:text-style-name="P4" draw:layer="layout" svg:width="13.309cm" svg:height="1.613cm" svg:x="6cm" svg:y="4cm">
          <draw:image xlink:href="Pictures/10000001000001F70000003DF309D2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Job 8</text:p>
          </draw:text-box>
        </draw:frame>
        <draw:frame draw:style-name="gr2" draw:text-style-name="P4" draw:layer="layout" svg:width="12.6cm" svg:height="1.658cm" svg:x="7.9cm" svg:y="12.342cm">
          <draw:image xlink:href="Pictures/10000001000002320000002DDDF2CC2A.png" xlink:type="simple" xlink:show="embed" xlink:actuate="onLoad" draw:mime-type="image/png">
            <text:p/>
          </draw:image>
        </draw:frame>
        <draw:frame draw:style-name="gr2" draw:text-style-name="P4" draw:layer="layout" svg:width="13.939cm" svg:height="8.735cm" svg:x="7cm" svg:y="3cm">
          <draw:image xlink:href="Pictures/10000001000002E6000001D1520A4C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Job 9</text:p>
          </draw:text-box>
        </draw:frame>
        <draw:frame draw:style-name="gr2" draw:text-style-name="P4" draw:layer="layout" svg:width="13.23cm" svg:height="9cm" svg:x="6.5cm" svg:y="4cm">
          <draw:image xlink:href="Pictures/100000010000020D000001FA841A5D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Job 10</text:p>
          </draw:text-box>
        </draw:frame>
        <draw:frame draw:style-name="gr2" draw:text-style-name="P4" draw:layer="layout" svg:width="12.523cm" svg:height="3.241cm" svg:x="7.977cm" svg:y="11.259cm">
          <draw:image xlink:href="Pictures/100000010000026D0000007292DA2880.png" xlink:type="simple" xlink:show="embed" xlink:actuate="onLoad" draw:mime-type="image/png">
            <text:p/>
          </draw:image>
        </draw:frame>
        <draw:frame draw:style-name="gr2" draw:text-style-name="P4" draw:layer="layout" svg:width="11.278cm" svg:height="8.126cm" svg:x="8.5cm" svg:y="2.874cm">
          <draw:image xlink:href="Pictures/1000000100000264000001B9C129C4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Job 11</text:p>
          </draw:text-box>
        </draw:frame>
        <draw:frame draw:style-name="gr2" draw:text-style-name="P4" draw:layer="layout" svg:width="11cm" svg:height="8.051cm" svg:x="8.5cm" svg:y="3cm">
          <draw:image xlink:href="Pictures/100000010000020E00000181D1A7CEE4.png" xlink:type="simple" xlink:show="embed" xlink:actuate="onLoad" draw:mime-type="image/png">
            <text:p/>
          </draw:image>
        </draw:frame>
        <draw:frame draw:style-name="gr2" draw:text-style-name="P4" draw:layer="layout" svg:width="17.807cm" svg:height="1.375cm" svg:x="5cm" svg:y="12.125cm">
          <draw:image xlink:href="Pictures/10000001000002A100000034B0BC59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Job 12</text:p>
          </draw:text-box>
        </draw:frame>
        <draw:frame draw:style-name="gr2" draw:text-style-name="P4" draw:layer="layout" svg:width="14.761cm" svg:height="4cm" svg:x="6cm" svg:y="3cm">
          <draw:image xlink:href="Pictures/1000000100000252000000A148758353.png" xlink:type="simple" xlink:show="embed" xlink:actuate="onLoad" draw:mime-type="image/png">
            <text:p/>
          </draw:image>
        </draw:frame>
        <draw:frame draw:style-name="gr2" draw:text-style-name="P4" draw:layer="layout" svg:width="14.076cm" svg:height="6.64cm" svg:x="6.5cm" svg:y="7.36cm">
          <draw:image xlink:href="Pictures/1000000100000214000000FB3B0672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Job 13<text:line-break/></text:p>
          </draw:text-box>
        </draw:frame>
        <draw:frame draw:style-name="gr2" draw:text-style-name="P4" draw:layer="layout" svg:width="24.939cm" svg:height="9cm" svg:x="1.561cm" svg:y="4.5cm">
          <draw:image xlink:href="Pictures/10000001000006600000024D2EC776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0FEEE525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presentation:date-time/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presentation:footer/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8D4164E9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presentation:date-time/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presentation:footer/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page-number>&lt;number&gt;</text:page-number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73228AA0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presentation:date-time/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presentation:footer/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FAA5917E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presentation:date-time/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presentation:footer/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page-number>&lt;number&gt;</text:page-number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9T09:46:38.682123700</meta:creation-date>
    <meta:generator>LibreOffice/25.8.3.2$Windows_X86_64 LibreOffice_project/8ca8d55c161d602844f5428fa4b58097424e324e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33M50S</meta:editing-duration>
    <meta:editing-cycles>3</meta:editing-cycles>
    <dc:date>2026-01-19T16:50:18.070487200</dc:date>
    <meta:document-statistic meta:object-count="146"/>
  </office:meta>
</office:document-meta>
</file>